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logo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xmlns:draw="urn:oasis:names:tc:opendocument:xmlns:drawing:1.0" xmlns:svg="urn:oasis:names:tc:opendocument:xmlns:svg-compatible:1.0" xmlns:xlink="http://www.w3.org/1999/xlink" xmlns:table="urn:oasis:names:tc:opendocument:xmlns:table:1.0" office:version="1.2">
  <office:automatic-styles>
    <style:style style:name="QuoteHeaderCell" style:family="table-cell">
      <style:table-cell-properties fo:background-color="#10531a" fo:border="none" fo:padding="0.2cm 0.3cm" style:vertical-align="middle"/>
    </style:style>
    <style:style style:name="QuoteCell" style:family="table-cell">
      <style:table-cell-properties fo:background-color="#ffffff" fo:border="none" fo:border-bottom="0.4pt solid #e5e7eb" fo:padding="0.17cm 0.3cm" style:vertical-align="middle"/>
    </style:style>
    <style:style style:name="QuoteCellAlt" style:family="table-cell">
      <style:table-cell-properties fo:background-color="#f4f8f5" fo:border="none" fo:border-bottom="0.4pt solid #e5e7eb" fo:padding="0.17cm 0.3cm" style:vertical-align="middle"/>
    </style:style>
    <style:style style:name="QuoteTotalCell" style:family="table-cell">
      <style:table-cell-properties fo:background-color="#e8f1ea" fo:border="none" fo:border-top="1.2pt solid #10531a" fo:border-bottom="1.2pt solid #10531a" fo:padding="0.24cm 0.3cm" style:vertical-align="middle"/>
    </style:style>
  </office:automatic-styles>
  <office:body>
    <office:text>
      <table:table table:name="HeaderTable" table:style-name="HeaderTable">
        <table:table-column table:style-name="HeaderColLogo"/>
        <table:table-column table:style-name="HeaderColBrand"/>
        <table:table-row>
          <table:table-cell table:style-name="HeaderCell">
            <text:p>
       <draw:frame draw:style-name="LogoFrame" draw:name="logo" text:anchor-type="paragraph" svg:width="3cm" svg:height="1.52cm" draw:z-index="0">
        <draw:image xlink:href="Pictures/logo.png" xlink:type="simple" xlink:show="embed" xlink:actuate="onLoad"/>
       </draw:frame>
      </text:p>
          </table:table-cell>
          <table:table-cell table:style-name="HeaderCell">
            <text:p text:style-name="HeaderBrandName">L'HARMATTAN SÉNÉGAL</text:p>
            <text:p text:style-name="HeaderTagline">ÉDITION · LIBRAIRIE · DIFFUSION</text:p>
            <text:p text:style-name="HeaderTagline">Faire revenir le livre dans le quotidien des Sénégalais</text:p>
          </table:table-cell>
        </table:table-row>
      </table:table>
      <text:p text:style-name="HeaderUnderline"> </text:p>
      <text:p text:style-name="QuoteRefBox">Devis N° {REF}</text:p>
      <text:p text:style-name="DateLine">DAKAR, le {DATE}</text:p>
      <text:p text:style-name="Recipient">À l'attention de {RECIPIENT_TITLE} {RECIPIENT_NAME}</text:p>
      <text:p text:style-name="Greeting">Bonjour,</text:p>
      <text:p text:style-name="IntroPara">Vous avez sollicité auprès de nous, un devis pour la publication d'un ouvrage intitulé :
    <text:span text:style-name="Bold">{BOOK_TITLE}</text:span> que nous acceptons de publier dans une de nos collections.</text:p>
      <text:p text:style-name="SectionLabel">Le devis ci-dessous est fait selon les termes suivants :</text:p>
      <text:p text:style-name="SpecBullet">- Le manuscrit sera corrigé par vos soins ou par des correcteurs typographes</text:p>
      <text:p text:style-name="SpecBullet">- Le manuscrit sera mis en pages au format livre par notre département PAO</text:p>
      <text:p text:style-name="SpecBullet">- Le livre fera environ {BOOK_PAGES} pages</text:p>
      <text:p text:style-name="SpecBullet">- Format : {BOOK_FORMAT}</text:p>
      <text:p text:style-name="SpecBullet">- L'intérieur du livre sera en {BOOK_INTERIOR} imprimé sur du papier {BOOK_PAPER}</text:p>
      <text:p text:style-name="SpecBullet">- Couverture {BOOK_COVER}</text:p>
      <text:p text:style-name="SpecBullet">- Prix public du livre à l'international : {BOOK_PRICE_EUR} euros</text:p>
      <text:p text:style-name="SpecBullet">- Parution mondiale, simultanément à {DIFFUSION}</text:p>
      <text:p text:style-name="QuoteIntro">Ainsi votre participation aux frais d'édition est :</text:p>
      <table:table table:name="QuoteTable" table:style-name="QuoteTable">
        <table:table-column table:style-name="QuoteColLabel"/>
        <table:table-column table:style-name="QuoteColPrice"/>
        <table:table-row>
          <table:table-cell table:style-name="QuoteHeaderCell">
            <text:p text:style-name="QuoteHeaderText">Désignation</text:p>
          </table:table-cell>
          <table:table-cell table:style-name="QuoteHeaderCell">
            <text:p text:style-name="QuoteHeaderTextRight">Prix (FCFA)</text:p>
          </table:table-cell>
        </table:table-row>
        <table:table-row>
          <table:table-cell table:style-name="QuoteCell">
            <text:p text:style-name="QuoteCellText">{ITEM_LABEL}</text:p>
          </table:table-cell>
          <table:table-cell table:style-name="QuoteCell">
            <text:p text:style-name="QuoteCellPrice">{ITEM_PRICE}</text:p>
          </table:table-cell>
        </table:table-row>
        <table:table-row>
          <table:table-cell table:style-name="QuoteTotalCell">
            <text:p text:style-name="QuoteCellTotalText">TOTAL</text:p>
          </table:table-cell>
          <table:table-cell table:style-name="QuoteTotalCell">
            <text:p text:style-name="QuoteCellTotalPrice">{TOTAL_AMOUNT} FCFA</text:p>
          </table:table-cell>
        </table:table-row>
      </table:table>
      <text:p text:style-name="TotalText">Arrêtée la présente facture à la somme de : {TOTAL_TEXT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svg="urn:oasis:names:tc:opendocument:xmlns:svg-compatible:1.0" xmlns:table="urn:oasis:names:tc:opendocument:xmlns:table:1.0" office:version="1.2">
  <office:font-face-decls>
    <style:font-face style:name="Liberation Serif" svg:font-family="Liberation Serif" style:font-family-generic="roman"/>
    <style:font-face style:name="Liberation Sans" svg:font-family="Liberation Sans" style:font-family-generic="swiss"/>
  </office:font-face-decls>
  <office:styles>
    <style:default-style style:family="paragraph">
      <style:paragraph-properties fo:margin-top="0cm" fo:margin-bottom="0.1cm" fo:line-height="120%" fo:text-align="justify"/>
      <style:text-properties style:font-name="Liberation Serif" fo:font-size="10.5pt" fo:language="fr" fo:country="FR" fo:color="#1a1a1a"/>
    </style:default-style>
    <style:style style:name="HeaderBrandName" style:family="paragraph">
      <style:paragraph-properties fo:text-align="left" fo:margin-bottom="0.05cm"/>
      <style:text-properties style:font-name="Liberation Sans" fo:font-size="13pt" fo:color="#10531a" fo:font-weight="bold" fo:letter-spacing="0.05cm"/>
    </style:style>
    <style:style style:name="HeaderTagline" style:family="paragraph">
      <style:paragraph-properties fo:text-align="left" fo:margin-bottom="0.05cm"/>
      <style:text-properties style:font-name="Liberation Sans" fo:font-size="9pt" fo:color="#6b7280" fo:letter-spacing="0.08cm"/>
    </style:style>
    <style:style style:name="HeaderUnderline" style:family="paragraph">
      <style:paragraph-properties fo:margin-top="0.1cm" fo:margin-bottom="0.2cm" fo:border-bottom="0.5pt solid #10531a" fo:padding-bottom="0cm"/>
      <style:text-properties fo:font-size="2pt"/>
    </style:style>
    <style:style style:name="QuoteRefBox" style:family="paragraph">
      <style:paragraph-properties fo:text-align="right" fo:background-color="#10531a" fo:padding="0.15cm 0.45cm" fo:margin-top="0.15cm" fo:margin-bottom="0.4cm"/>
      <style:text-properties style:font-name="Liberation Sans" fo:font-size="13pt" fo:font-weight="bold" fo:letter-spacing="0.05cm" fo:color="#ffffff"/>
    </style:style>
    <!-- Header table (logo + brand) -->
    <style:style style:name="HeaderTable" style:family="table">
      <style:table-properties style:width="17cm" table:align="margins"/>
    </style:style>
    <style:style style:name="HeaderColLogo" style:family="table-column">
      <style:table-column-properties style:column-width="3.5cm"/>
    </style:style>
    <style:style style:name="HeaderColBrand" style:family="table-column">
      <style:table-column-properties style:column-width="13.5cm"/>
    </style:style>
    <style:style style:name="HeaderCell" style:family="table-cell">
      <style:table-cell-properties fo:padding="0cm" fo:vertical-align="middle"/>
    </style:style>
    <style:style style:name="LogoFrame" style:family="graphic">
      <style:graphic-properties style:wrap="none" style:vertical-pos="middle" style:vertical-rel="paragraph" style:horizontal-pos="left" style:horizontal-rel="paragraph"/>
    </style:style>
    <style:style style:name="DateLine" style:family="paragraph">
      <style:paragraph-properties fo:text-align="right" fo:margin-top="0.2cm" fo:margin-bottom="0.05cm"/>
      <style:text-properties style:font-name="Liberation Serif" fo:font-size="10.5pt"/>
    </style:style>
    <style:style style:name="Recipient" style:family="paragraph">
      <style:paragraph-properties fo:text-align="right" fo:margin-bottom="0.35cm"/>
      <style:text-properties style:font-name="Liberation Serif" fo:font-size="10.5pt" fo:font-weight="bold"/>
    </style:style>
    <style:style style:name="Greeting" style:family="paragraph">
      <style:paragraph-properties fo:margin-top="0.1cm" fo:margin-bottom="0.15cm"/>
      <style:text-properties style:font-name="Liberation Serif" fo:font-size="10.5pt"/>
    </style:style>
    <style:style style:name="IntroPara" style:family="paragraph">
      <style:paragraph-properties fo:margin-bottom="0.2cm"/>
      <style:text-properties style:font-name="Liberation Serif" fo:font-size="10.5pt"/>
    </style:style>
    <style:style style:name="SectionLabel" style:family="paragraph">
      <style:paragraph-properties fo:margin-top="0.15cm" fo:margin-bottom="0.1cm"/>
      <style:text-properties style:font-name="Liberation Sans" fo:font-size="10.5pt" fo:font-weight="bold"/>
    </style:style>
    <style:style style:name="SpecBullet" style:family="paragraph">
      <style:paragraph-properties fo:margin-left="0.8cm" fo:margin-bottom="0.02cm" fo:text-align="left" fo:line-height="115%"/>
      <style:text-properties style:font-name="Liberation Serif" fo:font-size="10pt"/>
    </style:style>
    <style:style style:name="QuoteIntro" style:family="paragraph">
      <style:paragraph-properties fo:margin-top="0.2cm" fo:margin-bottom="0.1cm"/>
      <style:text-properties style:font-name="Liberation Serif" fo:font-size="10.5pt"/>
    </style:style>
    <style:style style:name="TotalText" style:family="paragraph">
      <style:paragraph-properties fo:text-align="left" fo:margin-top="0.35cm" fo:margin-bottom="0.1cm"/>
      <style:text-properties style:font-name="Liberation Serif" fo:font-size="10.5pt" fo:font-style="italic" fo:font-weight="bold" fo:color="#10531a"/>
    </style:style>
    <style:style style:name="Italic" style:family="text">
      <style:text-properties fo:font-style="italic"/>
    </style:style>
    <style:style style:name="Bold" style:family="text">
      <style:text-properties fo:font-weight="bold"/>
    </style:style>
    <!-- Table styles -->
    <style:style style:name="QuoteTable" style:family="table">
      <style:table-properties style:width="17cm" table:align="margins" fo:margin-top="0.25cm" fo:margin-bottom="0.2cm"/>
    </style:style>
    <!-- Colonne Désignation élargie (13.4cm) + police 9pt (cf. QuoteCellText) pour que
       les libellés longs ("…réalisation du Prêt-à-clicher", "…report de correction")
       tiennent sur UNE seule ligne : évite les retours à la ligne qui alourdissent le devis. -->
    <style:style style:name="QuoteColLabel" style:family="table-column">
      <style:table-column-properties style:column-width="13.4cm"/>
    </style:style>
    <style:style style:name="QuoteColPrice" style:family="table-column">
      <style:table-column-properties style:column-width="3.6cm"/>
    </style:style>
    <!-- Cellules (en-tête / lignes / total) → définies en automatic-styles dans
       content.xml (TABLE_CELL_AUTOSTYLES) : LibreOffice n'applique le fond et les
       bordures des cellules que pour des styles AUTOMATIQUES, pas pour des styles
       nommés de styles.xml. -->
    <style:style style:name="QuoteHeaderText" style:family="paragraph">
      <style:paragraph-properties fo:text-align="left" fo:margin-bottom="0cm"/>
      <style:text-properties style:font-name="Liberation Sans" fo:font-size="10pt" fo:font-weight="bold" fo:letter-spacing="0.04cm" fo:color="#ffffff"/>
    </style:style>
    <style:style style:name="QuoteHeaderTextRight" style:family="paragraph">
      <style:paragraph-properties fo:text-align="right" fo:margin-bottom="0cm"/>
      <style:text-properties style:font-name="Liberation Sans" fo:font-size="10pt" fo:font-weight="bold" fo:letter-spacing="0.04cm" fo:color="#ffffff"/>
    </style:style>
    <style:style style:name="QuoteCellText" style:family="paragraph">
      <style:paragraph-properties fo:text-align="left" fo:margin-bottom="0cm" fo:line-height="120%"/>
      <style:text-properties style:font-name="Liberation Serif" fo:font-size="9pt" fo:color="#1a1a1a"/>
    </style:style>
    <style:style style:name="QuoteCellPrice" style:family="paragraph">
      <style:paragraph-properties fo:text-align="right" fo:margin-bottom="0cm"/>
      <style:text-properties style:font-name="Liberation Serif" fo:font-size="9pt" fo:color="#1a1a1a"/>
    </style:style>
    <style:style style:name="QuoteCellTotalText" style:family="paragraph">
      <style:paragraph-properties fo:text-align="left" fo:margin-bottom="0cm"/>
      <style:text-properties style:font-name="Liberation Sans" fo:font-size="11.5pt" fo:font-weight="bold" fo:letter-spacing="0.03cm" fo:color="#10531a"/>
    </style:style>
    <style:style style:name="QuoteCellTotalPrice" style:family="paragraph">
      <style:paragraph-properties fo:text-align="right" fo:margin-bottom="0cm"/>
      <style:text-properties style:font-name="Liberation Sans" fo:font-size="13pt" fo:font-weight="bold" fo:color="#10531a"/>
    </style:style>
    <style:style style:name="FooterBank" style:family="paragraph">
      <style:paragraph-properties fo:text-align="center" fo:margin-top="0cm" fo:margin-bottom="0cm" fo:line-height="115%"/>
      <style:text-properties style:font-name="Liberation Sans" fo:font-size="7pt" fo:color="#6b7280"/>
    </style:style>
  </office:styles>
  <office:automatic-styles>
    <style:page-layout style:name="pmA4">
      <style:page-layout-properties fo:page-width="21cm" fo:page-height="29.7cm" fo:margin-top="1.5cm" fo:margin-bottom="1.5cm" fo:margin-left="1.8cm" fo:margin-right="1.8cm"/>
      <style:footer-style>
        <style:header-footer-properties fo:min-height="0.9cm" fo:margin-top="0.2cm"/>
      </style:footer-style>
    </style:page-layout>
  </office:automatic-styles>
  <office:master-styles>
    <style:master-page style:name="Standard" style:page-layout-name="pmA4">
      <style:footer>
        <text:p text:style-name="FooterBank">BP 45034 Dakar Fann · SARL au capital de 1 000 000 FCFA · RC : SN DKR 2009-B-11.042 · NINEA : 004067155</text:p>
        <text:p text:style-name="FooterBank">BANQUE : CBAO CLAIR DE LUNE, AVENUE CHEIKH ANTA DIOP · IBAN : SN08 SN012 01212 036199352101 46 · SWIFT : CBAOSNDA</text:p>
        <text:p text:style-name="FooterBank">Code marchand OM 413513 · WAVE 77 242 25 08 · senegal.harmattan.fr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meta:creation-date>2026-06-05T12:29:49.977Z</meta:creation-date>
    <dc:title>Devis de contribution auteur — L'Harmattan Sénégal</dc:title>
    <dc:creator>L'Harmattan Sénégal</dc:creator>
    <meta:generator>senharmattan-shop quote template v1</meta:generator>
  </office:meta>
</office:document-meta>
</file>